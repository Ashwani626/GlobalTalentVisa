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2">
      <text:list-level-style-bullet text:level="1" text:style-name="WW_CharLFO2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3">
      <text:list-level-style-bullet text:level="1" text:style-name="WW_CharLFO3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4">
      <text:list-level-style-bullet text:level="1" text:style-name="WW_CharLFO4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7%" fo:margin-left="0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color="#1F497D" fo:font-size="14pt" style:font-size-asian="14pt"/>
    </style:style>
    <style:style style:name="P3" style:parent-style-name="Normal" style:family="paragraph">
      <style:paragraph-properties fo:margin-left="-0.0034in">
        <style:tab-stops/>
      </style:paragraph-properties>
    </style:style>
    <style:style style:name="P4" style:parent-style-name="Normal" style:family="paragraph">
      <style:paragraph-properties fo:margin-bottom="0.0458in" fo:margin-left="-0.0034in">
        <style:tab-stops/>
      </style:paragraph-properties>
    </style:style>
    <style:style style:name="P5" style:parent-style-name="Normal" style:family="paragraph">
      <style:paragraph-properties fo:margin-bottom="0.3465in" fo:line-height="110%" fo:margin-left="-0.0034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color="#1F497D" fo:font-size="14pt" style:font-size-asian="14pt"/>
    </style:style>
    <style:style style:name="T7" style:parent-style-name="DefaultParagraphFont" style:family="text">
      <style:text-properties style:font-name="Calibri" style:font-name-asian="Calibri" style:font-name-complex="Calibri" fo:font-weight="bold" style:font-weight-asian="bold" fo:color="#1F497D" fo:font-size="14pt" style:font-size-asian="14pt"/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fo:color="#1F497D" fo:font-size="14pt" style:font-size-asian="14pt"/>
    </style:style>
    <style:style style:name="P9" style:parent-style-name="Heading1" style:family="paragraph">
      <style:paragraph-properties fo:margin-left="-0.0034in">
        <style:tab-stops/>
      </style:paragraph-properties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Heading1" style:family="paragraph">
      <style:paragraph-properties fo:margin-left="-0.0034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Heading1" style:family="paragraph">
      <style:paragraph-properties fo:margin-left="-0.0034in">
        <style:tab-stops/>
      </style:paragraph-properties>
    </style:style>
    <style:style style:name="P18" style:parent-style-name="Normal" style:family="paragraph">
      <style:paragraph-properties fo:margin-bottom="0in" fo:line-height="107%" fo:margin-left="0in" fo:text-indent="0in">
        <style:tab-stops/>
      </style:paragraph-properties>
      <style:text-properties fo:font-weight="bold" style:font-weight-asian="bold"/>
    </style:style>
    <style:style style:name="P19" style:parent-style-name="Normal" style:family="paragraph">
      <style:paragraph-properties fo:margin-bottom="0in" fo:line-height="107%" fo:margin-left="0in" fo:text-indent="0in">
        <style:tab-stops/>
      </style:paragraph-properties>
      <style:text-properties fo:font-weight="bold" style:font-weight-asian="bold"/>
    </style:style>
    <style:style style:name="P2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fo:color="#365F91" fo:font-size="14pt" style:font-size-asian="14pt"/>
    </style:style>
    <style:style style:name="P22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Normal" style:family="paragraph">
      <style:paragraph-properties fo:margin-bottom="0.1437in" fo:margin-left="-0.0034in">
        <style:tab-stops/>
      </style:paragraph-properties>
    </style:style>
    <style:style style:name="P25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26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27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28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29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30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31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32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33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34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35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P36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Normal" style:family="paragraph">
      <style:paragraph-properties fo:margin-bottom="0.1486in" fo:line-height="107%" fo:margin-left="-0.0034in">
        <style:tab-stops/>
      </style:paragraph-properties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Normal" style:family="paragraph">
      <style:paragraph-properties fo:text-indent="-0.1041in"/>
    </style:style>
    <style:style style:name="P43" style:parent-style-name="Normal" style:family="paragraph">
      <style:paragraph-properties fo:text-indent="-0.1041in"/>
    </style:style>
    <style:style style:name="P44" style:parent-style-name="Normal" style:family="paragraph">
      <style:paragraph-properties fo:text-indent="-0.1041in"/>
    </style:style>
    <style:style style:name="P45" style:parent-style-name="Normal" style:family="paragraph">
      <style:paragraph-properties fo:text-indent="-0.1041in"/>
    </style:style>
    <style:style style:name="P46" style:parent-style-name="Normal" style:family="paragraph">
      <style:paragraph-properties fo:margin-bottom="0.0062in" fo:text-indent="-0.1041in"/>
    </style:style>
    <style:style style:name="P47" style:parent-style-name="Normal" style:family="paragraph">
      <style:paragraph-properties fo:margin-bottom="0.0062in" fo:text-indent="-0.1041in"/>
    </style:style>
    <style:style style:name="P48" style:parent-style-name="Normal" style:family="paragraph">
      <style:paragraph-properties fo:margin-bottom="0in" fo:text-indent="-0.1041in"/>
    </style:style>
    <style:style style:name="P49" style:parent-style-name="Normal" style:family="paragraph">
      <style:paragraph-properties fo:margin-bottom="0.1451in" fo:text-indent="-0.1041in"/>
    </style:style>
    <style:style style:name="P50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Normal" style:family="paragraph">
      <style:paragraph-properties fo:margin-bottom="0.1486in" fo:line-height="107%" fo:margin-left="-0.0034in">
        <style:tab-stops/>
      </style:paragraph-properties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Normal" style:family="paragraph">
      <style:paragraph-properties fo:text-indent="-0.1041in"/>
    </style:style>
    <style:style style:name="P55" style:parent-style-name="Normal" style:family="paragraph">
      <style:paragraph-properties fo:text-indent="-0.1041in"/>
    </style:style>
    <style:style style:name="P56" style:parent-style-name="Normal" style:family="paragraph">
      <style:paragraph-properties fo:text-indent="-0.1041in"/>
    </style:style>
    <style:style style:name="P57" style:parent-style-name="Normal" style:family="paragraph">
      <style:paragraph-properties fo:margin-bottom="0.1472in" fo:text-indent="-0.1041in"/>
    </style:style>
    <style:style style:name="P58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Normal" style:family="paragraph">
      <style:paragraph-properties fo:margin-bottom="0.1486in" fo:line-height="107%" fo:margin-left="-0.0034in">
        <style:tab-stops/>
      </style:paragraph-properties>
    </style:style>
    <style:style style:name="T61" style:parent-style-name="DefaultParagraphFont" style:family="text">
      <style:text-properties fo:font-weight="bold" style:font-weight-asian="bold"/>
    </style:style>
    <style:style style:name="P62" style:parent-style-name="Normal" style:family="paragraph">
      <style:paragraph-properties fo:text-indent="-0.1041in"/>
    </style:style>
    <style:style style:name="P63" style:parent-style-name="Normal" style:family="paragraph">
      <style:paragraph-properties fo:text-indent="-0.1041in"/>
    </style:style>
    <style:style style:name="P64" style:parent-style-name="Normal" style:family="paragraph">
      <style:paragraph-properties fo:text-indent="-0.1041in"/>
    </style:style>
    <style:style style:name="P65" style:parent-style-name="Normal" style:family="paragraph">
      <style:paragraph-properties fo:text-indent="-0.1041in"/>
    </style:style>
    <style:style style:name="P66" style:parent-style-name="Normal" style:family="paragraph">
      <style:paragraph-properties fo:margin-bottom="0.1909in" fo:line-height="107%" fo:margin-left="0in" fo:text-indent="0in">
        <style:tab-stops/>
      </style:paragraph-properties>
    </style:style>
    <style:style style:name="P67" style:parent-style-name="Heading1" style:family="paragraph">
      <style:paragraph-properties fo:margin-left="-0.0034in">
        <style:tab-stops/>
      </style:paragraph-properties>
    </style:style>
    <style:style style:name="T68" style:parent-style-name="DefaultParagraphFont" style:family="text">
      <style:text-properties fo:color="#000000"/>
    </style:style>
    <style:style style:name="P69" style:parent-style-name="Normal" style:family="paragraph">
      <style:paragraph-properties fo:text-indent="-0.1041in"/>
    </style:style>
    <style:style style:name="P70" style:parent-style-name="Normal" style:family="paragraph">
      <style:paragraph-properties fo:text-indent="-0.1041in"/>
    </style:style>
    <style:style style:name="P71" style:parent-style-name="Normal" style:family="paragraph">
      <style:paragraph-properties fo:margin-bottom="0.1902in" fo:line-height="107%" fo:margin-left="0in" fo:text-indent="0in">
        <style:tab-stops/>
      </style:paragraph-properties>
    </style:style>
    <style:style style:name="P72" style:parent-style-name="Heading1" style:family="paragraph">
      <style:paragraph-properties fo:margin-left="-0.0034in">
        <style:tab-stops/>
      </style:paragraph-properties>
    </style:style>
    <style:style style:name="P73" style:parent-style-name="Normal" style:family="paragraph">
      <style:paragraph-properties fo:margin-bottom="0.0062in" fo:text-indent="-0.1041in"/>
    </style:style>
    <style:style style:name="P74" style:parent-style-name="Normal" style:family="paragraph">
      <style:paragraph-properties fo:margin-bottom="0.0062in" fo:text-indent="-0.1041in"/>
    </style:style>
    <style:style style:name="P75" style:parent-style-name="Normal" style:family="paragraph">
      <style:paragraph-properties fo:text-indent="-0.1041in"/>
    </style:style>
    <style:style style:name="P76" style:parent-style-name="Normal" style:family="paragraph">
      <style:paragraph-properties fo:text-indent="-0.1041in"/>
    </style:style>
    <style:style style:name="P77" style:parent-style-name="Normal" style:family="paragraph">
      <style:paragraph-properties fo:margin-bottom="0in" fo:line-height="107%" fo:margin-left="0in" fo:text-indent="0in">
        <style:tab-stops/>
      </style:paragraph-properties>
    </style:style>
  </office:automatic-styles>
  <office:body>
    <office:text text:use-soft-page-breaks="true">
      <text:p text:style-name="P1"><text:span text:style-name="T2">ASHWANI VERMA<text:s/></text:span></text:p>
      <text:p text:style-name="P3">Reading, United Kingdom<text:s/></text:p>
      <text:p text:style-name="P4">Mobile: +44 7867215245 | Email: ashwani626@gmail.com<text:s/></text:p>
      <text:p text:style-name="P5"><text:span text:style-name="T6">Senior Software Development Engineer In<text:s/></text:span><text:span text:style-name="T7">Test (</text:span><text:span text:style-name="T8">SDET)</text:span><text:s/></text:p>
      <text:h text:style-name="P9" text:outline-level="1">Professional Summary<text:s/></text:h>
      <text:p text:style-name="Normal">Senior SDET and Senior Quality Engineering professional with 14+ years of experience designing and delivering enterprise automation solutions across<text:s/><text:span text:style-name="T10">Financial Services, Public Sector, Energy &amp; Utilities and Telecom domains</text:span>. Experienced in architecting scalable UI and API automation frameworks, modernizing legacy automation ecosystems and integrating quality engineering into Azure DevOps CI/CD pipelines.<text:s/><text:s/></text:p>
      <text:p text:style-name="Normal"/>
      <text:h text:style-name="P11" text:outline-level="1">CAREER HIGHLIGHTS</text:h>
      <text:p text:style-name="Normal"><text:span text:style-name="T12">QA Automation Framework</text:span><text:s/>Built scalable automation frameworks achieving 80%+ regression coverage, reducing manual effort by 60–70%., improved execution time by 40%<text:s/>using parallel execution, delivered 500+ API scenarios, and modernized testing with Playwright and Selenium.</text:p>
      <text:p text:style-name="Normal"><text:span text:style-name="T13">AI Capabilities<text:s/></text:span>Applied AI-assisted engineering practices using GitHub Copilot to accelerate automation development and improve engineering.</text:p>
      <text:p text:style-name="Normal"><text:span text:style-name="T14">Test Data Management System</text:span><text:s/>Developed automated test data generation and management system, reducing test data setup time by 70% and improving test environment consistency.</text:p>
      <text:p text:style-name="Normal"><text:span text:style-name="T15">CICD Integration<text:s/></text:span>Integrated automated tests into<text:s/>Azure<text:s/>CI/CD pipelines with quality gates, reducing deployment time by 40% while maintaining 95%+ test reliability.</text:p>
      <text:p text:style-name="Normal"><text:span text:style-name="T16">Team Management<text:s/></text:span>Led<text:s/>10<text:s/>Test engineers across internal and vendor teams, driving automation adoption and capability uplift.</text:p>
      <text:p text:style-name="Normal"/>
      <text:h text:style-name="P17" text:outline-level="1">Technical Skills<text:s/></text:h>
      <text:p text:style-name="P18">Selenium WebDriver, TestNG, JUnit, REST Assured, Postman, Cypress, Playwright, Java, Python,<text:s/>C#,<text:s/>JavaScript, Jenkins, Docker, Kubernetes,<text:s/>Microsoft Azure,<text:s/>ExtentReports, Git, JIRA, TestRail, Zephyr,<text:s/>Bugzilla, <text:s/>Chrome DevTools, <text:s text:c="2"/>Agile/Scrum, API Testing, <text:s/>Mobile Testing, Database Testing, Functional Testing, Regression Testing, Smoke Testing, Sanity Testing,<text:s/>Shift-Left,<text:s/>User Acceptance Testing,<text:s/>Copilot, GitHub Copilot, Robot Framework.</text:p>
      <text:p text:style-name="P19"/>
      <text:p text:style-name="P20"><text:span text:style-name="T21">Professional Experience<text:s/></text:span></text:p>
      <text:p text:style-name="P22"><text:span text:style-name="T23">Tata Consultancy Services (TCS)</text:span><text:s/></text:p>
      <text:p text:style-name="P24">Senior SDET | 2021<text:s/>–<text:s/>Present, London, UK<text:s/></text:p>
      <text:soft-page-break/>
      <text:p text:style-name="P25">• Designed and enhanced enterprise automation frameworks using Playwright, Selenium WebDriver, C#, Java and Python, supporting UI, API and end-to-end testing across multiple business-critical applications.</text:p>
      <text:p text:style-name="P26">• Built scalable API automation solutions using REST Assured and Postman, delivering automated validation for more than 500 business-critical API scenarios.</text:p>
      <text:p text:style-name="P27">• Increased automation coverage to more than 80% across critical business functionality through strategic automation of high-value regression scenarios.</text:p>
      <text:p text:style-name="P28">• Reduced manual regression effort by approximately 60–70%, enabling faster delivery cycles and improving overall release confidence.</text:p>
      <text:p text:style-name="P29">• Integrated automation suites into Azure DevOps and Jenkins CI/CD pipelines, reducing release validation effort by more than 50% and providing continuous quality feedback throughout the delivery lifecycle.</text:p>
      <text:p text:style-name="P30">• Improved automation execution performance by approximately 40% through parallel execution, framework optimisation and containerised execution environments.</text:p>
      <text:p text:style-name="P31">• Applied GitHub Copilot and AI capabilities to improve automation development productivity and support AI-assisted quality engineering initiatives.</text:p>
      <text:p text:style-name="P32">• Worked closely with Solution Architects, Engineering Managers, Developers<text:s/>for shift-left reducing production defects by 45%<text:s/>and Product Owners to ensure automation strategy aligned with engineering and business objectives.</text:p>
      <text:p text:style-name="P33">• Mentored automation engineers through framework reviews, technical coaching and engineering best practices, supporting the adoption of consistent automation standards across Agile teams.</text:p>
      <text:p text:style-name="P34">• Validated data integrity across Azure Cosmos DB, REST APIs and UI, ensuring consistent data across distributed microservices.</text:p>
      <text:p text:style-name="P35"/>
      <text:p text:style-name="P36"><text:span text:style-name="T37">Capgemini<text:s/></text:span></text:p>
      <text:p text:style-name="P38"><text:span text:style-name="T39">Automation Tester<text:s/></text:span><text:span text:style-name="T40">| 2017</text:span><text:span text:style-name="T41"><text:s/>– 2021, Gurgaon, India</text:span><text:s/></text:p>
      <text:list text:style-name="LFO1" text:continue-numbering="true">
        <text:list-item>
          <text:p text:style-name="P42">Developed automation frameworks for web, mobile, and API applications.<text:s/></text:p>
        </text:list-item>
        <text:list-item>
          <text:p text:style-name="P43">Implemented BDD frameworks using Java with Selenium and Cucumber with Typescript achieving 70%+ regression automation coverage.<text:s/></text:p>
        </text:list-item>
        <text:list-item>
          <text:p text:style-name="P44">Built CI/CD validation pipelines using Jenkins and Docker.<text:s/></text:p>
        </text:list-item>
        <text:list-item>
          <text:p text:style-name="P45">Improved test execution efficiency through parallel execution and containerized testing.<text:s/></text:p>
        </text:list-item>
        <text:list-item>
          <text:p text:style-name="P46">API Automation with Rest<text:s/>Assured,<text:s/>Robot Framework and Python<text:s/>for UAT TestCases</text:p>
        </text:list-item>
        <text:list-item>
          <text:p text:style-name="P47">Collaborated with developers, architects, product owners, and business stakeholders to<text:s/>ensure quality throughout the software development lifecycle.<text:s/></text:p>
        </text:list-item>
        <text:list-item>
          <text:p text:style-name="P48">Conducted code reviews, provided technical mentorship, and supported automation<text:s/>adoption across multiple teams.<text:s/></text:p>
        </text:list-item>
        <text:list-item>
          <text:p text:style-name="P49">Collaborated with 15+ cross-functional teams to implement shift-left testing practices, reducing production defects by 45%.</text:p>
        </text:list-item>
      </text:list>
      <text:p text:style-name="P50"><text:span text:style-name="T51">Cyber Group<text:s/></text:span></text:p>
      <text:p text:style-name="P52"><text:span text:style-name="T53">QA Automation Engineer | 2015 – 2017, Noida, India</text:span><text:s/></text:p>
      <text:soft-page-break/>
      <text:list text:style-name="LFO1" text:continue-numbering="true">
        <text:list-item>
          <text:p text:style-name="P54">Developed end-to-end test automation suite for checkout and payment systems using Selenium, TestNG, and REST Assured, achieving 85% test coverage.</text:p>
        </text:list-item>
        <text:list-item>
          <text:p text:style-name="P55">Implemented cross-browser automation using Selenium Grid.<text:s/></text:p>
        </text:list-item>
        <text:list-item>
          <text:p text:style-name="P56">Developed API automation frameworks using REST Assured and Postman.<text:s/></text:p>
        </text:list-item>
        <text:list-item>
          <text:p text:style-name="P57">Enhanced framework scalability, maintainability, and execution reliability.<text:s/></text:p>
        </text:list-item>
      </text:list>
      <text:p text:style-name="P58"><text:span text:style-name="T59">Yamaha Motors<text:s/></text:span></text:p>
      <text:p text:style-name="P60"><text:span text:style-name="T61">QA Automation Engineer | 2012 – 2015, Faridabad, India</text:span><text:s/></text:p>
      <text:list text:style-name="LFO1" text:continue-numbering="true">
        <text:list-item>
          <text:p text:style-name="P62">Developed hybrid and keyword-driven automation frameworks using Selenium and TestNG.<text:s/></text:p>
        </text:list-item>
        <text:list-item>
          <text:p text:style-name="P63">Executed functional, regression, integration, smoke, and database testing.<text:s/></text:p>
        </text:list-item>
        <text:list-item>
          <text:p text:style-name="P64">Performed backend validation and cross-browser testing.<text:s/></text:p>
        </text:list-item>
        <text:list-item>
          <text:p text:style-name="P65">Supported end-to-end testing activities across multiple release cycles <text:s/></text:p>
        </text:list-item>
      </text:list>
      <text:p text:style-name="P66"><text:s/></text:p>
      <text:h text:style-name="P67" text:outline-level="1">Education<text:span text:style-name="T68"><text:s text:c="2"/></text:span></text:h>
      <text:list text:style-name="LFO2" text:continue-numbering="true">
        <text:list-item>
          <text:p text:style-name="P69">Bachelor of Technology (Information Technology)<text:s/></text:p>
        </text:list-item>
        <text:list-item>
          <text:p text:style-name="P70">Manav<text:s/>Rachna College of Engineering | 2011<text:s/></text:p>
        </text:list-item>
      </text:list>
      <text:p text:style-name="P71"><text:s/></text:p>
      <text:h text:style-name="P72" text:outline-level="1">Certifications<text:s/></text:h>
      <text:list text:style-name="LFO3" text:continue-numbering="true">
        <text:list-item>
          <text:p text:style-name="P73">Generative AI for Software Testing (self-learning / professional training) <text:s/></text:p>
        </text:list-item>
        <text:list-item>
          <text:p text:style-name="P74">AI Testing Foundation<text:s/></text:p>
        </text:list-item>
        <text:list-item>
          <text:p text:style-name="P75">Microsoft Azure AI-900<text:s/></text:p>
        </text:list-item>
        <text:list-item>
          <text:p text:style-name="P76">Deep Learning Certification<text:s/>–<text:s/>GUVI<text:s/></text:p>
        </text:list-item>
      </text:list>
      <text:p text:style-name="P77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line-height="110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1F497D" fo:font-size="14pt" style:font-size-asian="14pt" fo:hyphenate="false"/>
    </style:style>
    <style:style style:name="Normal" style:display-name="Normal" style:family="paragraph">
      <style:paragraph-properties fo:margin-bottom="0.0055in" fo:line-height="111%" fo:margin-left="0.0069in" fo:text-indent="-0.0069in">
        <style:tab-stops/>
      </style:paragraph-properties>
      <style:text-properties style:font-name="Cambria" style:font-name-asian="Cambria" style:font-name-complex="Cambria" fo:color="#000000"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1F497D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2">
      <text:list-level-style-bullet text:level="1" text:style-name="WW_CharLFO2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3">
      <text:list-level-style-bullet text:level="1" text:style-name="WW_CharLFO3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text:list-style style:name="LFO4">
      <text:list-level-style-bullet text:level="1" text:style-name="WW_CharLFO4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Cambria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mbria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mbria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mbria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mbria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mbria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mbria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mbria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mbria"/>
      </text:list-level-style-bullet>
    </text:list-style>
    <style:page-layout style:name="PL0">
      <style:page-layout-properties fo:page-width="8.5in" fo:page-height="11in" style:print-orientation="portrait" fo:margin-top="1.027in" fo:margin-left="1.2506in" fo:margin-bottom="1.1576in" fo:margin-right="1.2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ython-docx</meta:initial-creator>
    <dc:creator>Ashwani Verma</dc:creator>
    <meta:creation-date>2026-06-24T08:53:00Z</meta:creation-date>
    <dc:date>2026-06-24T10:09:00Z</dc:date>
    <meta:template xlink:href="Normal" xlink:type="simple"/>
    <meta:editing-cycles>7</meta:editing-cycles>
    <meta:editing-duration>PT4620S</meta:editing-duration>
    <meta:document-statistic meta:page-count="3" meta:paragraph-count="93" meta:word-count="692" meta:character-count="5588" meta:row-count="110" meta:non-whitespace-character-count="4989"/>
  </office:meta>
</office:document-meta>
</file>